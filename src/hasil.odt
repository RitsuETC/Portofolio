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2ACA455DBAD.png" manifest:media-type="image/png"/>
  <manifest:file-entry manifest:full-path="Pictures/1000000100000556000002AEA6359D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JetBrains Mono ExtraBold" svg:font-family="'JetBrains Mono ExtraBol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JetBrains Mono ExtraBold" officeooo:rsid="001693af" officeooo:paragraph-rsid="001693a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belum</text:p>
      <text:p text:style-name="P1"><draw:frame draw:style-name="fr1" draw:name="Image1" text:anchor-type="char" svg:width="6.9252in" svg:height="3.4772in" draw:z-index="0"><draw:image xlink:href="Pictures/1000000100000556000002AEA6359DEA.png" xlink:type="simple" xlink:show="embed" xlink:actuate="onLoad" draw:mime-type="image/png"/></draw:frame>-</text:p>
      <text:p text:style-name="P1"/>
      <text:p text:style-name="P1">Sesudah</text:p>
      <text:p text:style-name="P1"><draw:frame draw:style-name="fr1" draw:name="Image2" text:anchor-type="char" svg:width="6.9252in" svg:height="3.4673in" draw:z-index="1"><draw:image xlink:href="Pictures/1000000100000556000002ACA455DB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JetBrains Mono ExtraBold" svg:font-family="'JetBrains Mono ExtraBol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10:26:38.294494328</meta:creation-date>
    <dc:date>2026-01-31T10:29:14.733434618</dc:date>
    <meta:editing-duration>PT2M39S</meta:editing-duration>
    <meta:editing-cycles>1</meta:editing-cycles>
    <meta:document-statistic meta:table-count="0" meta:image-count="2" meta:object-count="0" meta:page-count="1" meta:paragraph-count="3" meta:word-count="3" meta:character-count="15" meta:non-whitespace-character-count="15"/>
    <meta:generator>LibreOffice/25.2.7.2$Linux_X86_64 LibreOffice_project/520$Build-2</meta:generator>
  </office:meta>
</office:document-meta>
</file>